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500000281B68E135352F212A6.png" manifest:media-type="image/png"/>
  <manifest:file-entry manifest:full-path="Pictures/100002010000043C00000273E4BE834934EB4130.png" manifest:media-type="image/png"/>
  <manifest:file-entry manifest:full-path="Pictures/1000020100000430000002646AADA1D2860EF049.png" manifest:media-type="image/png"/>
  <manifest:file-entry manifest:full-path="Pictures/100002010000042D0000028A22E97BDA53EF39B4.png" manifest:media-type="image/png"/>
  <manifest:file-entry manifest:full-path="Pictures/10000201000004730000029BF9D7495A4ADBB0E2.png" manifest:media-type="image/png"/>
  <manifest:file-entry manifest:full-path="Pictures/100002010000045D0000027554C89CEB8B138A3A.png" manifest:media-type="image/png"/>
  <manifest:file-entry manifest:full-path="Pictures/100002010000042600000264F9287AECF2F5726A.png" manifest:media-type="image/png"/>
  <manifest:file-entry manifest:full-path="Pictures/10000201000004250000025852AF6BF5D597DF17.png" manifest:media-type="image/png"/>
  <manifest:file-entry manifest:full-path="Pictures/1000020100000455000002503ED0EB8B62ACB902.png" manifest:media-type="image/png"/>
  <manifest:file-entry manifest:full-path="Pictures/100002010000043E0000026CB32D3F6A2383621D.png" manifest:media-type="image/png"/>
  <manifest:file-entry manifest:full-path="Pictures/10000201000004360000026CB1F4FBD4C8EB52EF.png" manifest:media-type="image/png"/>
  <manifest:file-entry manifest:full-path="Pictures/100002010000043D0000028391DEE9E843450F0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.459cm" fo:margin-bottom="0cm" fo:line-height="115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964cm" text:min-label-width="0.846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964cm" text:min-label-width="0.846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4.986cm" svg:height="14.287cm" svg:x="0.207cm" svg:y="0cm">
          <draw:image xlink:href="Pictures/10000201000004360000026CB1F4FBD4C8EB52EF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59;p14" draw:style-name="gr1" draw:text-style-name="P1" draw:layer="layout" svg:width="25.399cm" svg:height="13.558cm" svg:x="0cm" svg:y="0.364cm">
          <draw:image xlink:href="Pictures/1000020100000455000002503ED0EB8B62ACB902.png" xlink:type="simple" xlink:show="embed" xlink:actuate="onLoad">
            <text:p/>
          </draw:image>
        </draw:frame>
        <presentation:notes draw:style-name="dp2">
          <draw:page-thumbnail draw:name="Google Shape;56;g3ec0cd3baf6_0_1:notes" draw:style-name="gr2" draw:layer="layout" svg:width="16.932cm" svg:height="9.524cm" svg:x="1.059cm" svg:y="1.905cm" draw:page-number="2" presentation:class="page"/>
          <draw:frame draw:name="Google Shape;57;g3ec0cd3baf6_0_1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4;p15" draw:style-name="gr1" draw:text-style-name="P1" draw:layer="layout" svg:width="25.025cm" svg:height="14.287cm" svg:x="0.187cm" svg:y="0cm">
          <draw:image xlink:href="Pictures/1000020100000430000002646AADA1D2860EF049.png" xlink:type="simple" xlink:show="embed" xlink:actuate="onLoad">
            <text:p/>
          </draw:image>
        </draw:frame>
        <presentation:notes draw:style-name="dp2">
          <draw:page-thumbnail draw:name="Google Shape;61;g3ec0cd3baf6_0_7:notes" draw:style-name="gr2" draw:layer="layout" svg:width="16.932cm" svg:height="9.524cm" svg:x="1.059cm" svg:y="1.905cm" draw:page-number="3" presentation:class="page"/>
          <draw:frame draw:name="Google Shape;62;g3ec0cd3baf6_0_7:notes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69;p16" draw:style-name="gr1" draw:text-style-name="P1" draw:layer="layout" svg:width="23.496cm" svg:height="14.287cm" svg:x="0.951cm" svg:y="0cm">
          <draw:image xlink:href="Pictures/100002010000042D0000028A22E97BDA53EF39B4.png" xlink:type="simple" xlink:show="embed" xlink:actuate="onLoad">
            <text:p/>
          </draw:image>
        </draw:frame>
        <presentation:notes draw:style-name="dp2">
          <draw:page-thumbnail draw:name="Google Shape;66;g3ec0cd3baf6_0_13:notes" draw:style-name="gr2" draw:layer="layout" svg:width="16.932cm" svg:height="9.524cm" svg:x="1.059cm" svg:y="1.905cm" draw:page-number="4" presentation:class="page"/>
          <draw:frame draw:name="Google Shape;67;g3ec0cd3baf6_0_13:notes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4;p17" draw:style-name="gr1" draw:text-style-name="P1" draw:layer="layout" svg:width="24.397cm" svg:height="14.287cm" svg:x="0.501cm" svg:y="0cm">
          <draw:image xlink:href="Pictures/10000201000004730000029BF9D7495A4ADBB0E2.png" xlink:type="simple" xlink:show="embed" xlink:actuate="onLoad">
            <text:p/>
          </draw:image>
        </draw:frame>
        <presentation:notes draw:style-name="dp2">
          <draw:page-thumbnail draw:name="Google Shape;71;g3ec0cd3baf6_0_19:notes" draw:style-name="gr2" draw:layer="layout" svg:width="16.932cm" svg:height="9.524cm" svg:x="1.059cm" svg:y="1.905cm" draw:page-number="5" presentation:class="page"/>
          <draw:frame draw:name="Google Shape;72;g3ec0cd3baf6_0_19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9;p18" draw:style-name="gr1" draw:text-style-name="P1" draw:layer="layout" svg:width="24.792cm" svg:height="14.287cm" svg:x="0.303cm" svg:y="0cm">
          <draw:image xlink:href="Pictures/100002010000042600000264F9287AECF2F5726A.png" xlink:type="simple" xlink:show="embed" xlink:actuate="onLoad">
            <text:p/>
          </draw:image>
        </draw:frame>
        <presentation:notes draw:style-name="dp2">
          <draw:page-thumbnail draw:name="Google Shape;76;g3ec0cd3baf6_0_25:notes" draw:style-name="gr2" draw:layer="layout" svg:width="16.932cm" svg:height="9.524cm" svg:x="1.059cm" svg:y="1.905cm" draw:page-number="6" presentation:class="page"/>
          <draw:frame draw:name="Google Shape;77;g3ec0cd3baf6_0_25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84;p19" draw:style-name="gr1" draw:text-style-name="P1" draw:layer="layout" svg:width="25.264cm" svg:height="14.287cm" svg:x="0.068cm" svg:y="0cm">
          <draw:image xlink:href="Pictures/10000201000004250000025852AF6BF5D597DF17.png" xlink:type="simple" xlink:show="embed" xlink:actuate="onLoad">
            <text:p/>
          </draw:image>
        </draw:frame>
        <presentation:notes draw:style-name="dp2">
          <draw:page-thumbnail draw:name="Google Shape;81;g3ec0cd3baf6_1_1:notes" draw:style-name="gr2" draw:layer="layout" svg:width="16.932cm" svg:height="9.524cm" svg:x="1.059cm" svg:y="1.905cm" draw:page-number="7" presentation:class="page"/>
          <draw:frame draw:name="Google Shape;82;g3ec0cd3baf6_1_1:notes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89;p20" draw:style-name="gr1" draw:text-style-name="P1" draw:layer="layout" svg:width="25.025cm" svg:height="14.287cm" svg:x="0.187cm" svg:y="0cm">
          <draw:image xlink:href="Pictures/100002010000043E0000026CB32D3F6A2383621D.png" xlink:type="simple" xlink:show="embed" xlink:actuate="onLoad">
            <text:p/>
          </draw:image>
        </draw:frame>
        <presentation:notes draw:style-name="dp2">
          <draw:page-thumbnail draw:name="Google Shape;86;g3ec0cd3baf6_1_7:notes" draw:style-name="gr2" draw:layer="layout" svg:width="16.932cm" svg:height="9.524cm" svg:x="1.059cm" svg:y="1.905cm" draw:page-number="8" presentation:class="page"/>
          <draw:frame draw:name="Google Shape;87;g3ec0cd3baf6_1_7:notes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94;p21" draw:style-name="gr1" draw:text-style-name="P1" draw:layer="layout" svg:width="25.371cm" svg:height="14.287cm" svg:x="0cm" svg:y="0cm">
          <draw:image xlink:href="Pictures/100002010000045D0000027554C89CEB8B138A3A.png" xlink:type="simple" xlink:show="embed" xlink:actuate="onLoad">
            <text:p/>
          </draw:image>
        </draw:frame>
        <presentation:notes draw:style-name="dp2">
          <draw:page-thumbnail draw:name="Google Shape;91;g3ec0cd3baf6_1_13:notes" draw:style-name="gr2" draw:layer="layout" svg:width="16.932cm" svg:height="9.524cm" svg:x="1.059cm" svg:y="1.905cm" draw:page-number="9" presentation:class="page"/>
          <draw:frame draw:name="Google Shape;92;g3ec0cd3baf6_1_13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99;p22" draw:style-name="gr1" draw:text-style-name="P1" draw:layer="layout" svg:width="24.108cm" svg:height="14.287cm" svg:x="0.646cm" svg:y="0cm">
          <draw:image xlink:href="Pictures/100002010000043D0000028391DEE9E843450F03.png" xlink:type="simple" xlink:show="embed" xlink:actuate="onLoad">
            <text:p/>
          </draw:image>
        </draw:frame>
        <presentation:notes draw:style-name="dp2">
          <draw:page-thumbnail draw:name="Google Shape;96;g3ec0cd3baf6_1_19:notes" draw:style-name="gr2" draw:layer="layout" svg:width="16.932cm" svg:height="9.524cm" svg:x="1.059cm" svg:y="1.905cm" draw:page-number="10" presentation:class="page"/>
          <draw:frame draw:name="Google Shape;97;g3ec0cd3baf6_1_19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04;p23" draw:style-name="gr1" draw:text-style-name="P1" draw:layer="layout" svg:width="24.7cm" svg:height="14.287cm" svg:x="0.349cm" svg:y="0cm">
          <draw:image xlink:href="Pictures/100002010000043C00000273E4BE834934EB4130.png" xlink:type="simple" xlink:show="embed" xlink:actuate="onLoad">
            <text:p/>
          </draw:image>
        </draw:frame>
        <presentation:notes draw:style-name="dp2">
          <draw:page-thumbnail draw:name="Google Shape;101;g3ec0cd3baf6_1_31:notes" draw:style-name="gr2" draw:layer="layout" svg:width="16.932cm" svg:height="9.524cm" svg:x="1.059cm" svg:y="1.905cm" draw:page-number="11" presentation:class="page"/>
          <draw:frame draw:name="Google Shape;102;g3ec0cd3baf6_1_31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09;p24" draw:style-name="gr1" draw:text-style-name="P1" draw:layer="layout" svg:width="24.005cm" svg:height="14.286cm" svg:x="0.697cm" svg:y="0cm">
          <draw:image xlink:href="Pictures/100002010000043500000281B68E135352F212A6.png" xlink:type="simple" xlink:show="embed" xlink:actuate="onLoad">
            <text:p/>
          </draw:image>
        </draw:frame>
        <presentation:notes draw:style-name="dp2">
          <draw:page-thumbnail draw:name="Google Shape;106;g3ec0cd3baf6_1_25:notes" draw:style-name="gr2" draw:layer="layout" svg:width="16.932cm" svg:height="9.524cm" svg:x="1.059cm" svg:y="1.905cm" draw:page-number="12" presentation:class="page"/>
          <draw:frame draw:name="Google Shape;107;g3ec0cd3baf6_1_25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guntas pendientes" draw:style-name="dp1" draw:master-page-name="TITLE_5f_AND_5f_BODY" presentation:presentation-page-layout-name="AL2T1">
        <draw:frame draw:name="Google Shape;114;p25" presentation:style-name="pr13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Preguntas pendientes</text:span></text:p>
          </draw:text-box>
        </draw:frame>
        <draw:frame draw:name="Google Shape;115;p25" presentation:style-name="pr14" draw:text-style-name="P10" draw:layer="layout" svg:width="24.533cm" svg:height="11.085cm" svg:x="0.866cm" svg:y="3.201cm" presentation:class="outline" presentation:user-transformed="true">
          <draw:text-box>
            <text:list text:style-name="L2">
              <text:list-item>
                <text:p text:style-name="P5"><text:span text:style-name="T2">Situacion adulto 1 y situacion adulto 2, cambiarlo por personas relacionadas y un campo de relacion (para padres </text:span><text:span text:style-name="T2"><text:tab/></text:span><text:span text:style-name="T2">menores y pareja en alguien mayor)</text:span></text:p>
              </text:list-item>
              <text:list-item>
                <text:p text:style-name="P6"><text:span text:style-name="T2">Data d'alta por defecto o que lo escriban a mano (en caso se haya dado de alta en una fecha anterior )</text:span></text:p>
              </text:list-item>
            </text:list>
            <text:p text:style-name="P7"><text:span text:style-name="T2">datos de un proyecto ( dir, duracion, aforo ... ) </text:span></text:p>
            <text:list text:continue-numbering="true" text:style-name="L2">
              <text:list-item>
                <text:p text:style-name="P8"><text:span text:style-name="T2">Roles dentro de la familia o entre usuarios (IMPORTANTE)</text:span></text:p>
              </text:list-item>
              <text:list-item>
                <text:p text:style-name="P8"><text:span text:style-name="T2">Els projectes tenen 1 sol responsable ?? qui ha d'inscriure persones als projectes i/o crear clients</text:span></text:p>
              </text:list-item>
              <text:list-item>
                <text:p text:style-name="P8"><text:span text:style-name="T2">Averiguar si ellos hacen un seguimiento, para asociar familias con centros de coordinacion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Los centros de coordinacion no ven familias directamente (ahora) ven proyectos y por medio de estos ven familias, y viceversa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">Un centre d'activitats pot dependre de més d'un centre de coord ( activitats fetes des de diversos centres de coord en el mateix centre activitats ) ?</text:span></text:p>
                <text:list>
                  <text:list-item>
                    <text:list>
                      <text:list-item>
                        <text:p text:style-name="P8"><text:span text:style-name="T2">Averiguar si desde central y un centro de coordinacion puedan hacer actividades (en un centro de actividades de ese barrio) o solo por medio del centro de coordinación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Google Shape;111;g3ec0cd3baf6_1_37:notes" draw:style-name="gr2" draw:layer="layout" svg:width="16.932cm" svg:height="9.524cm" svg:x="1.059cm" svg:y="1.905cm" draw:page-number="13" presentation:class="page"/>
          <draw:frame draw:name="Google Shape;112;g3ec0cd3baf6_1_37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6.0.5.2$Linux_X86_64 LibreOffice_project/</meta:generator>
  </office:meta>
</office:document-meta>
</file>